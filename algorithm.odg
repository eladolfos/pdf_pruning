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30000000FE64215FD.png" manifest:media-type="image/png"/>
  <manifest:file-entry manifest:full-path="Pictures/10006D7C00000F3D00000189864A531B.svg" manifest:media-type="image/svg+xml"/>
  <manifest:file-entry manifest:full-path="Pictures/100000010000005A0000001C0B366A5F.png" manifest:media-type="image/png"/>
  <manifest:file-entry manifest:full-path="Pictures/1000370400000951000002DFD7410CDB.svg" manifest:media-type="image/svg+xml"/>
  <manifest:file-entry manifest:full-path="Pictures/100000010000009C0000001E21ECC889.png" manifest:media-type="image/png"/>
  <manifest:file-entry manifest:full-path="Pictures/10005E1C0000101800000324671E4CA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 style:font-pitch="variable"/>
    <style:font-face style:name="Roboto Medium1" svg:font-family="'Roboto Medium'"/>
    <style:font-face style:name="Roboto1" svg:font-family="Roboto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353cm" svg:stroke-color="#ffffff" draw:marker-start-width="0.728cm" draw:marker-end-width="0.728cm" draw:fill="solid" draw:fill-color="#023f62" draw:textarea-horizontal-align="justify" draw:textarea-vertical-align="middle" draw:auto-grow-height="false" fo:min-height="1.519cm" fo:min-width="25.592cm" fo:padding-top="0.3cm" fo:padding-bottom="0.3cm" fo:padding-left="0.425cm" fo:padding-right="0.42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.212cm" svg:stroke-color="#333333" draw:marker-start-width="0.518cm" draw:marker-end-width="0.518cm" draw:fill="none" draw:fill-color="#333333" loext:fill-use-slide-background="false" draw:textarea-horizontal-align="justify" draw:textarea-vertical-align="middle" draw:auto-grow-height="false" fo:min-height="1.21cm" fo:min-width="8.315cm" fo:padding-top="0.231cm" fo:padding-bottom="0.231cm" fo:padding-left="0.356cm" fo:padding-right="0.356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212cm" svg:stroke-color="#00274e" draw:marker-start-width="0.518cm" draw:marker-end-width="0.518cm" draw:fill="none" draw:fill-color="#10263b" loext:fill-use-slide-background="false" draw:textarea-horizontal-align="justify" draw:textarea-vertical-align="top" draw:auto-grow-height="false" fo:min-height="3.549cm" fo:min-width="12.507cm" fo:padding-top="0.231cm" fo:padding-bottom="0.231cm" fo:padding-left="0.356cm" fo:padding-right="0.356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solid" svg:stroke-width="0.212cm" svg:stroke-color="#005d5d" draw:marker-start-width="0.518cm" draw:marker-end-width="0.518cm" draw:fill="none" draw:fill-color="#10263b" loext:fill-use-slide-background="false" draw:textarea-horizontal-align="justify" draw:textarea-vertical-align="top" draw:auto-grow-height="false" fo:min-height="3.345cm" fo:min-width="12.53cm" fo:padding-top="0.231cm" fo:padding-bottom="0.231cm" fo:padding-left="0.356cm" fo:padding-right="0.35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4c4c4c" draw:marker-start-width="0.518cm" draw:marker-end-width="0.518cm" draw:fill="none" loext:fill-use-slide-background="false" draw:textarea-horizontal-align="justify" draw:textarea-vertical-align="middle" draw:auto-grow-height="false" fo:min-height="3.19cm" fo:min-width="5.004cm" fo:padding-top="0.231cm" fo:padding-bottom="0.231cm" fo:padding-left="0.356cm" fo:padding-right="0.35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212cm" svg:stroke-color="#005d5d" draw:marker-start-width="0.518cm" draw:marker-end-width="0.518cm" draw:fill="none" draw:fill-color="#10263b" loext:fill-use-slide-background="false" draw:textarea-horizontal-align="justify" draw:textarea-vertical-align="top" draw:auto-grow-height="false" fo:min-height="4.983cm" fo:min-width="12.035cm" fo:padding-top="0.231cm" fo:padding-bottom="0.231cm" fo:padding-left="0.356cm" fo:padding-right="0.35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212cm" svg:stroke-color="#00274e" draw:marker-start-width="0.518cm" draw:marker-end-width="0.518cm" draw:fill="none" draw:fill-color="#10263b" loext:fill-use-slide-background="false" draw:textarea-horizontal-align="justify" draw:textarea-vertical-align="top" draw:auto-grow-height="false" fo:min-height="4.695cm" fo:min-width="12.383cm" fo:padding-top="0.231cm" fo:padding-bottom="0.231cm" fo:padding-left="0.356cm" fo:padding-right="0.35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59cm" svg:stroke-color="#4c4c4c" draw:marker-start-width="0.438cm" draw:marker-end="Arrowheads_20_22" draw:marker-end-width="0.538cm" draw:fill="none" draw:textarea-vertical-align="middle" fo:padding-top="0.204cm" fo:padding-bottom="0.204cm" fo:padding-left="0.329cm" fo:padding-right="0.329cm" loext:decorative="false"/>
    </style:style>
    <style:style style:name="gr10" style:family="graphic" style:parent-style-name="objectwithoutfill">
      <style:graphic-properties svg:stroke-width="0.159cm" svg:stroke-color="#4c4c4c" draw:marker-start-width="0.438cm" draw:marker-end="Arrowheads_20_24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 style:list-style-name="L1">
      <style:graphic-properties draw:stroke="solid" svg:stroke-width="0.212cm" svg:stroke-color="#9e4f00" draw:marker-start-width="0.518cm" draw:marker-end-width="0.518cm" draw:fill="none" draw:fill-color="#10263b" loext:fill-use-slide-background="false" draw:textarea-horizontal-align="justify" draw:textarea-vertical-align="top" draw:auto-grow-height="false" fo:min-height="2.951cm" fo:min-width="13.207cm" fo:padding-top="0.231cm" fo:padding-bottom="0.231cm" fo:padding-left="0.356cm" fo:padding-right="0.35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11cm" fo:min-width="4.80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4c4c4c" draw:marker-start-width="0.439cm" draw:marker-end="Arrowheads_20_25" draw:marker-end-width="0.539cm" draw:fill="none" draw:textarea-vertical-align="middle" fo:padding-top="0.205cm" fo:padding-bottom="0.205cm" fo:padding-left="0.33cm" fo:padding-right="0.33cm" loext:decorative="false"/>
    </style:style>
    <style:style style:name="gr14" style:family="graphic" style:parent-style-name="objectwithoutfill">
      <style:graphic-properties svg:stroke-width="0.159cm" svg:stroke-color="#4c4c4c" draw:marker-start-width="0.439cm" draw:marker-end="Arrowheads_20_26" draw:marker-end-width="0.539cm" draw:fill="none" draw:textarea-vertical-align="middle" fo:padding-top="0.205cm" fo:padding-bottom="0.205cm" fo:padding-left="0.33cm" fo:padding-right="0.33cm" loext:decorative="false"/>
    </style:style>
    <style:style style:name="gr15" style:family="graphic" style:parent-style-name="objectwithoutfill">
      <style:graphic-properties svg:stroke-width="0.159cm" svg:stroke-color="#4c4c4c" draw:marker-start-width="0.439cm" draw:marker-end="Arrowheads_20_28" draw:marker-end-width="0.539cm" draw:fill="none" draw:textarea-vertical-align="middle" fo:padding-top="0.205cm" fo:padding-bottom="0.205cm" fo:padding-left="0.33cm" fo:padding-right="0.33cm" loext:decorative="false"/>
    </style:style>
    <style:style style:name="gr16" style:family="graphic" style:parent-style-name="objectwithoutfill">
      <style:graphic-properties svg:stroke-width="0.159cm" svg:stroke-color="#4c4c4c" draw:marker-start-width="0.439cm" draw:marker-end="Arrowheads_20_29" draw:marker-end-width="0.539cm" draw:fill="none" draw:textarea-vertical-align="middle" fo:padding-top="0.205cm" fo:padding-bottom="0.205cm" fo:padding-left="0.33cm" fo:padding-right="0.33cm" loext:decorative="false"/>
    </style:style>
    <style:style style:name="gr17" style:family="graphic" style:parent-style-name="objectwithoutfill">
      <style:graphic-properties svg:stroke-width="0.159cm" svg:stroke-color="#4c4c4c" draw:marker-start-width="0.439cm" draw:marker-end="Arrowheads_20_30" draw:marker-end-width="0.539cm" draw:fill="none" draw:textarea-vertical-align="middle" fo:padding-top="0.205cm" fo:padding-bottom="0.205cm" fo:padding-left="0.33cm" fo:padding-right="0.33cm" loext:decorative="false"/>
    </style:style>
    <style:style style:name="gr18" style:family="graphic" style:parent-style-name="standard" style:list-style-name="L1">
      <style:graphic-properties draw:stroke="solid" svg:stroke-width="0.212cm" svg:stroke-color="#023f62" draw:marker-start-width="0.518cm" draw:marker-end-width="0.518cm" draw:fill="none" draw:fill-color="#10263b" loext:fill-use-slide-background="false" draw:textarea-horizontal-align="justify" draw:textarea-vertical-align="middle" draw:auto-grow-height="false" fo:min-height="2.378cm" fo:min-width="7.237cm" fo:padding-top="0.231cm" fo:padding-bottom="0.231cm" fo:padding-left="0.356cm" fo:padding-right="0.356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159cm" svg:stroke-color="#4c4c4c" draw:marker-start-width="0.438cm" draw:marker-end="Arrowheads_20_31" draw:marker-end-width="0.538cm" draw:fill="none" draw:textarea-vertical-align="middle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611cm" fo:min-width="3.21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611cm" fo:min-width="5.663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/>
      <style:text-properties style:font-name="Roboto1" fo:font-weight="bold"/>
    </style:style>
    <style:style style:name="P2" style:family="paragraph">
      <loext:graphic-properties draw:fill="solid" draw:fill-color="#023f62"/>
      <style:paragraph-properties fo:margin-left="0cm" fo:margin-right="0cm" fo:margin-top="0.42cm" fo:margin-bottom="0.35cm" fo:line-height="100%" fo:text-align="center" fo:text-indent="0cm" style:writing-mode="lr-tb"/>
      <style:text-properties style:font-name="Roboto1" fo:font-weight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color="#333333" loext:opacity="100%" fo:font-size="14pt" fo:font-weight="bold" style:font-size-asian="14pt" style:font-size-complex="14pt"/>
    </style:style>
    <style:style style:name="P4" style:family="paragraph">
      <loext:graphic-properties draw:fill="none" draw:fill-color="#333333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fo:font-size="14pt" fo:font-weight="bold" style:font-size-asian="14pt" style:font-size-complex="14pt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  <style:text-properties fo:color="#10263b" loext:opacity="100%" fo:font-size="14pt" fo:font-weight="normal" style:font-size-asian="14pt" style:font-size-complex="14pt"/>
    </style:style>
    <style:style style:name="P6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10263b" loext:opacity="100%" fo:font-size="14pt" fo:font-weight="normal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fo:color="#005d5d" loext:opacity="100%" fo:font-size="14pt" fo:font-weight="normal" style:font-size-asian="14pt" style:font-size-complex="14pt"/>
    </style:style>
    <style:style style:name="P9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005d5d" loext:opacity="100%" fo:font-size="14pt" fo:font-weight="normal" style:font-size-asian="14pt" style:font-size-complex="14pt"/>
    </style:style>
    <style:style style:name="P10" style:family="paragraph">
      <style:paragraph-properties fo:text-align="center"/>
      <style:text-properties fo:color="#4c4c4c" loext:opacity="100%" style:font-name="Roboto1"/>
    </style:style>
    <style:style style:name="P11" style:family="paragraph">
      <loext:graphic-properties draw:fill="none"/>
      <style:paragraph-properties fo:text-align="center" style:writing-mode="lr-tb"/>
      <style:text-properties fo:color="#4c4c4c" loext:opacity="100%" style:font-name="Roboto1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  <style:text-properties fo:color="#9e4f00" loext:opacity="100%" fo:font-size="14pt" fo:font-weight="normal" style:font-size-asian="14pt" style:font-size-complex="14pt"/>
    </style:style>
    <style:style style:name="P13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9e4f00" loext:opacity="100%" fo:font-size="14pt" fo:font-weight="normal" style:font-size-asian="14pt" style:font-size-complex="14pt"/>
    </style:style>
    <style:style style:name="P14" style:family="paragraph">
      <style:paragraph-properties fo:text-align="center"/>
      <style:text-properties fo:color="#4c4c4c" loext:opacity="100%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4c4c4c" loext:opacity="100%" fo:font-weight="bold" style:font-weight-asian="bold" style:font-weight-complex="bold"/>
    </style:style>
    <style:style style:name="P16" style:family="paragraph">
      <style:paragraph-properties fo:margin-left="0cm" fo:margin-right="0cm" fo:margin-top="0.42cm" fo:margin-bottom="0.35cm" fo:line-height="100%" fo:text-align="center" fo:text-indent="0cm"/>
      <style:text-properties fo:color="#023f62" loext:opacity="100%" fo:font-size="14pt" fo:font-weight="bold" style:font-size-asian="14pt" style:font-size-complex="14pt"/>
    </style:style>
    <style:style style:name="P17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023f62" loext:opacity="100%" fo:font-size="14pt" fo:font-weight="bold" style:font-size-asian="14pt" style:font-size-complex="14pt"/>
    </style:style>
    <style:style style:name="P18" style:family="paragraph">
      <style:paragraph-properties fo:text-align="center"/>
      <style:text-properties fo:color="#4c4c4c" loext:opacity="100%" style:font-name="Roboto1"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4c4c4c" loext:opacity="100%" style:font-name="Roboto1" fo:font-weight="bold" style:font-weight-asian="bold" style:font-weight-complex="bold"/>
    </style:style>
    <style:style style:name="P20" style:family="paragraph">
      <style:paragraph-properties fo:text-align="center"/>
      <style:text-properties fo:color="#4c4c4c" loext:opacity="100%" style:font-name="TexMaths Symbols1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4c4c4c" loext:opacity="100%" style:font-name="TexMaths Symbols1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4c4c4c" loext:opacity="100%" style:font-name="Roboto1" fo:font-weight="bold" style:font-weight-asian="bold" style:font-weight-complex="bold"/>
    </style:style>
    <style:style style:name="T1" style:family="text">
      <style:text-properties fo:color="#ffffff" loext:opacity="100%" style:font-name="Roboto1" fo:font-size="36pt" fo:font-weight="bold" style:font-size-asian="36pt" style:font-size-complex="36pt"/>
    </style:style>
    <style:style style:name="T2" style:family="text">
      <style:text-properties fo:color="#333333" loext:opacity="100%" style:font-name="Roboto Medium" fo:font-size="28pt" fo:font-weight="bold" style:font-size-asian="28pt" style:font-size-complex="28pt"/>
    </style:style>
    <style:style style:name="T3" style:family="text">
      <style:text-properties fo:color="#10263b" loext:opacity="100%" style:font-name="Roboto Medium" fo:font-size="28pt" fo:font-weight="normal" style:font-size-asian="28pt" style:font-size-complex="28pt"/>
    </style:style>
    <style:style style:name="T4" style:family="text">
      <style:text-properties fo:color="#10263b" loext:opacity="100%" style:text-position="0% 100%" style:font-name="Roboto Medium1" fo:font-size="32pt" fo:font-style="normal" style:text-underline-style="none" fo:font-weight="normal" style:font-name-asian="Roboto Medium1" style:font-size-asian="32pt" style:font-style-asian="normal" style:font-weight-asian="normal" style:font-name-complex="Roboto Medium1" style:font-size-complex="32pt" style:font-style-complex="normal" style:font-weight-complex="normal"/>
    </style:style>
    <style:style style:name="T5" style:family="text">
      <style:text-properties fo:color="#005d5d" loext:opacity="100%" style:font-name="Roboto Medium" fo:font-size="28pt" fo:font-weight="normal" style:font-size-asian="28pt" style:font-size-complex="28pt"/>
    </style:style>
    <style:style style:name="T6" style:family="text">
      <style:text-properties fo:color="#4c4c4c" loext:opacity="100%" style:font-name="TexMaths Symbols" fo:font-size="26pt" fo:font-style="normal" style:text-underline-style="none" fo:font-weight="normal" style:font-name-asian="TexMaths Symbols" style:font-size-asian="26pt" style:font-style-asian="normal" style:font-weight-asian="normal" style:font-name-complex="TexMaths Symbols" style:font-size-complex="26pt" style:font-style-complex="normal" style:font-weight-complex="normal"/>
    </style:style>
    <style:style style:name="T7" style:family="text">
      <style:text-properties fo:color="#4c4c4c" loext:opacity="100%" style:text-position="sub 58%" style:font-name="TexMaths Symbols" fo:font-size="26pt" fo:font-style="normal" style:text-underline-style="none" fo:font-weight="normal" style:font-name-asian="TexMaths Symbols" style:font-size-asian="26pt" style:font-style-asian="normal" style:font-weight-asian="normal" style:font-name-complex="TexMaths Symbols" style:font-size-complex="26pt" style:font-style-complex="normal" style:font-weight-complex="normal"/>
    </style:style>
    <style:style style:name="T8" style:family="text">
      <style:text-properties fo:color="#4c4c4c" loext:opacity="100%" style:text-position="0% 100%" style:font-name="Roboto" fo:font-size="26pt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9" style:family="text">
      <style:text-properties fo:color="#4c4c4c" loext:opacity="100%" style:font-name="Roboto1" fo:font-size="26pt" style:font-size-asian="26pt" style:font-size-complex="26pt"/>
    </style:style>
    <style:style style:name="T10" style:family="text">
      <style:text-properties fo:color="#005d5d" loext:opacity="100%" style:font-name="Roboto Medium" fo:font-size="21pt" fo:font-weight="normal" style:font-size-asian="21pt" style:font-size-complex="21pt"/>
    </style:style>
    <style:style style:name="T11" style:family="text">
      <style:text-properties fo:color="#10263b" loext:opacity="100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2" style:family="text">
      <style:text-properties fo:color="#10263b" loext:opacity="100%" style:text-position="sub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3" style:family="text">
      <style:text-properties fo:color="#10263b" loext:opacity="100%" style:font-name="Roboto Medium" fo:font-size="21pt" fo:font-weight="normal" style:font-size-asian="21pt" style:font-size-complex="21pt"/>
    </style:style>
    <style:style style:name="T14" style:family="text">
      <style:text-properties fo:color="#9e4f00" loext:opacity="100%" style:font-name="Roboto Medium" fo:font-size="28pt" fo:font-weight="normal" style:font-size-asian="28pt" style:font-size-complex="28pt"/>
    </style:style>
    <style:style style:name="T15" style:family="text">
      <style:text-properties fo:color="#9e4f00" loext:opacity="100%" style:font-name="Roboto Medium" fo:font-size="21pt" fo:font-weight="normal" style:font-size-asian="21pt" style:font-size-complex="21pt"/>
    </style:style>
    <style:style style:name="T16" style:family="text">
      <style:text-properties fo:color="#4c4c4c" loext:opacity="100%" fo:font-size="21pt" fo:font-weight="bold" style:font-size-asian="21pt" style:font-weight-asian="bold" style:font-size-complex="21pt" style:font-weight-complex="bold"/>
    </style:style>
    <style:style style:name="T17" style:family="text">
      <style:text-properties fo:color="#023f62" loext:opacity="100%" style:font-name="Roboto Medium" fo:font-size="28pt" fo:font-weight="bold" style:font-size-asian="28pt" style:font-size-complex="28pt"/>
    </style:style>
    <style:style style:name="T18" style:family="text">
      <style:text-properties fo:color="#4c4c4c" loext:opacity="100%" style:font-name="Roboto1" fo:font-size="21pt" fo:font-weight="bold" style:font-size-asian="21pt" style:font-weight-asian="bold" style:font-size-complex="21pt" style:font-weight-complex="bold"/>
    </style:style>
    <style:style style:name="T19" style:family="text">
      <style:text-properties fo:color="#4c4c4c" loext:opacity="100%" style:font-name="TexMaths Symbols" fo:font-size="21pt" fo:font-style="normal" style:text-underline-style="none" fo:font-weight="bold" style:font-name-asian="TexMaths Symbols" style:font-size-asian="21pt" style:font-style-asian="normal" style:font-weight-asian="bold" style:font-name-complex="TexMaths Symbols" style:font-size-complex="21pt" style:font-style-complex="normal" style:font-weight-complex="bold"/>
    </style:style>
    <style:style style:name="T20" style:family="text">
      <style:text-properties fo:color="#4c4c4c" loext:opacity="100%" style:text-position="sub 58%" style:font-name="TexMaths Symbols" fo:font-size="21pt" fo:font-style="normal" style:text-underline-style="none" fo:font-weight="bold" style:font-name-asian="TexMaths Symbols" style:font-size-asian="21pt" style:font-style-asian="normal" style:font-weight-asian="bold" style:font-name-complex="TexMaths Symbols" style:font-size-complex="21pt" style:font-style-complex="normal" style:font-weight-complex="bold"/>
    </style:style>
    <style:style style:name="T21" style:family="text">
      <style:text-properties fo:color="#4c4c4c" loext:opacity="100%" style:text-position="0% 100%" style:font-name="Roboto" fo:font-size="21pt" fo:font-style="normal" style:text-underline-style="none" fo:font-weight="bold" style:font-name-asian="Roboto" style:font-size-asian="21pt" style:font-style-asian="normal" style:font-weight-asian="bold" style:font-name-complex="Roboto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67cm" svg:height="2.347cm" svg:x="3.963cm" svg:y="2.052cm">
          <text:p text:style-name="P1"><text:span text:style-name="T1">Cambridge-Aachen Algorith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4" draw:layer="layout" svg:width="9.207cm" svg:height="1.852cm" svg:x="12.648cm" svg:y="5.02cm">
          <text:p text:style-name="P3"><text:span text:style-name="T2">List of vect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6" xml:id="id2" draw:id="id2" draw:layer="layout" svg:width="13.653cm" svg:height="4.445cm" svg:x="10.413cm" svg:y="8.142cm">
          <text:p text:style-name="P5"><text:span text:style-name="T3">Compute pairwise distance</text:span></text:p>
          <text:p text:style-name="P5"><text:span text:style-name="T4">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7" draw:layer="layout" svg:width="10.709cm" svg:height="2.088cm" svg:x="11.952cm" svg:y="10.147cm">
          <draw:image xlink:href="Pictures/10005E1C0000101800000324671E4CAF.svg" xlink:type="simple" xlink:show="embed" xlink:actuate="onLoad" draw:mime-type="image/svg+xml">
            <text:p/>
          </draw:image>
          <draw:image xlink:href="Pictures/100000010000009C0000001E21ECC889.png" xlink:type="simple" xlink:show="embed" xlink:actuate="onLoad" draw:mime-type="image/png"/>
          <svg:title>TexMaths</svg:title>
          <svg:desc>26§display§d_{ij}=\dfrac{D(\va{v}_i, \va{v}_j)^2}{R^2}, ~~ d_{iB}=1§svg§600§TRUE§</svg:desc>
        </draw:frame>
        <draw:custom-shape draw:style-name="gr5" draw:text-style-name="P9" xml:id="id3" draw:id="id3" draw:layer="layout" svg:width="13.652cm" svg:height="4.217cm" svg:x="10.431cm" svg:y="14.057cm">
          <text:p text:style-name="P8"><text:span text:style-name="T5">Find the global minimu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7" draw:layer="layout" svg:width="10.14cm" svg:height="1.019cm" svg:x="12.153cm" svg:y="16.695cm">
          <draw:image xlink:href="Pictures/10006D7C00000F3D00000189864A531B.svg" xlink:type="simple" xlink:show="embed" xlink:actuate="onLoad" draw:mime-type="image/svg+xml">
            <text:p/>
          </draw:image>
          <draw:image xlink:href="Pictures/10000001000000930000000FE64215FD.png" xlink:type="simple" xlink:show="embed" xlink:actuate="onLoad" draw:mime-type="image/png"/>
          <svg:title>TexMaths</svg:title>
          <svg:desc>26§display§d_{min}=min\{ \text{all } d_{ij}, ~d_{iB}  \}§svg§600§TRUE§</svg:desc>
        </draw:frame>
        <draw:custom-shape draw:style-name="gr6" draw:text-style-name="P11" xml:id="id4" draw:id="id4" draw:layer="layout" svg:width="11.43cm" svg:height="7.302cm" svg:x="11.618cm" svg:y="19.72cm">
          <text:p text:style-name="P10"><text:span text:style-name="T6">d</text:span><text:span text:style-name="T7">min</text:span><text:span text:style-name="T8"> </text:span><text:span text:style-name="T9"><text:s/>is?</text:span></text:p>
          <text:p text:style-name="P10"><text:span text:style-name="T9">which typ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9" xml:id="id5" draw:id="id5" draw:layer="layout" svg:width="13.335cm" svg:height="6.033cm" svg:x="2.446cm" svg:y="27.791cm">
          <text:p text:style-name="P8"><text:span text:style-name="T5">Merge vectors</text:span></text:p>
          <text:p text:style-name="P8"><text:span text:style-name="T10"/></text:p>
          <text:p text:style-name="P8"><text:span text:style-name="T10"/></text:p>
          <text:p text:style-name="P8"><text:span text:style-name="T10">New proto-vector replaces pai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7" draw:layer="layout" svg:width="6.198cm" svg:height="1.908cm" svg:x="5.456cm" svg:y="30.129cm">
          <draw:image xlink:href="Pictures/1000370400000951000002DFD7410CDB.svg" xlink:type="simple" xlink:show="embed" xlink:actuate="onLoad" draw:mime-type="image/svg+xml">
            <text:p/>
          </draw:image>
          <draw:image xlink:href="Pictures/100000010000005A0000001C0B366A5F.png" xlink:type="simple" xlink:show="embed" xlink:actuate="onLoad" draw:mime-type="image/png"/>
          <svg:title>TexMaths</svg:title>
          <svg:desc>26§display§    \va{v}_{new}=\dfrac{ \va{v}_i+ \va{v}_j }{2}§svg§600§TRUE§</svg:desc>
        </draw:frame>
        <draw:custom-shape draw:style-name="gr8" draw:text-style-name="P6" xml:id="id6" draw:id="id6" draw:layer="layout" svg:width="13.653cm" svg:height="5.715cm" svg:x="18.733cm" svg:y="28.009cm">
          <text:p text:style-name="P5"><text:span text:style-name="T3">Promote </text:span><text:span text:style-name="T11">v</text:span><text:span text:style-name="T12">i</text:span><text:span text:style-name="T4"> </text:span><text:span text:style-name="T3">→ cluster</text:span></text:p>
          <text:p text:style-name="P5"><text:span text:style-name="T13">Remove </text:span><text:span text:style-name="T11">v</text:span><text:span text:style-name="T12">i</text:span><text:span text:style-name="T4"> </text:span><text:span text:style-name="T13"><text:s/>from the list and add to final cluster collection</text:span></text:p>
          <text:p text:style-name="P5"><text:span text:style-name="T4">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7" draw:layer="layout" draw:line-skew="-9.275cm" svg:x1="10.283cm" svg:y1="38.356cm" svg:x2="10.413cm" svg:y2="10.364cm" draw:start-shape="id1" draw:start-glue-point="3" draw:end-shape="id2" draw:end-glue-point="3" svg:d="M10283 38356h-9883v-27992h10013" svg:viewBox="0 0 10014 27993">
          <text:p/>
        </draw:connector>
        <draw:line draw:style-name="gr10" draw:text-style-name="P7" draw:layer="layout" svg:x1="12.218cm" svg:y1="24.724cm" svg:x2="8.726cm" svg:y2="27.264cm">
          <text:p/>
        </draw:line>
        <draw:line draw:style-name="gr10" draw:text-style-name="P7" draw:layer="layout" svg:x1="22.061cm" svg:y1="24.724cm" svg:x2="25.553cm" svg:y2="27.582cm">
          <text:p/>
        </draw:line>
        <draw:custom-shape draw:style-name="gr11" draw:text-style-name="P13" xml:id="id1" draw:id="id1" draw:layer="layout" svg:width="14.287cm" svg:height="3.781cm" svg:x="10.283cm" svg:y="36.466cm">
          <text:p text:style-name="P12"><text:span text:style-name="T14">Vectors remaining?</text:span></text:p>
          <text:p text:style-name="P12"><text:span text:style-name="T15">Is the proto-vector list empty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5" draw:layer="layout" svg:width="5.397cm" svg:height="0.953cm" svg:x="3.746cm" svg:y="36.846cm">
          <text:p text:style-name="P14"><text:span text:style-name="T16">N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7" draw:layer="layout" draw:type="line" svg:x1="17.251cm" svg:y1="6.772cm" svg:x2="17.239cm" svg:y2="8.142cm" draw:end-shape="id2" draw:end-glue-point="0" svg:d="M17251 6772l-12 1370" svg:viewBox="0 0 13 1371">
          <text:p/>
        </draw:connector>
        <draw:connector draw:style-name="gr14" draw:text-style-name="P7" draw:layer="layout" draw:type="line" svg:x1="17.239cm" svg:y1="12.587cm" svg:x2="17.257cm" svg:y2="14.057cm" draw:start-shape="id2" draw:start-glue-point="2" draw:end-shape="id3" draw:end-glue-point="0" svg:d="M17239 12587l18 1470" svg:viewBox="0 0 19 1471">
          <text:p/>
        </draw:connector>
        <draw:connector draw:style-name="gr15" draw:text-style-name="P7" draw:layer="layout" draw:type="line" svg:x1="17.257cm" svg:y1="18.274cm" svg:x2="17.333cm" svg:y2="19.72cm" draw:start-shape="id3" draw:start-glue-point="2" draw:end-shape="id4" draw:end-glue-point="4" svg:d="M17257 18274l76 1446" svg:viewBox="0 0 77 1447">
          <text:p/>
        </draw:connector>
        <draw:connector draw:style-name="gr16" draw:text-style-name="P7" draw:layer="layout" svg:x1="9.113cm" svg:y1="33.824cm" svg:x2="17.426cm" svg:y2="36.466cm" draw:start-shape="id5" draw:start-glue-point="2" draw:end-shape="id1" draw:end-glue-point="0" svg:d="M9113 33824v1320h8313v1322" svg:viewBox="0 0 8314 2643">
          <text:p/>
        </draw:connector>
        <draw:connector draw:style-name="gr17" draw:text-style-name="P7" draw:layer="layout" svg:x1="25.559cm" svg:y1="33.724cm" svg:x2="17.426cm" svg:y2="36.466cm" draw:start-shape="id6" draw:start-glue-point="2" draw:end-shape="id1" draw:end-glue-point="0" svg:d="M25559 33724v1427h-8133v1315" svg:viewBox="0 0 8134 2743">
          <text:p/>
        </draw:connector>
        <draw:custom-shape draw:style-name="gr18" draw:text-style-name="P17" xml:id="id7" draw:id="id7" draw:layer="layout" svg:width="8.255cm" svg:height="3.146cm" svg:x="13.288cm" svg:y="42.676cm">
          <text:p text:style-name="P16"><text:span text:style-name="T17">Final cluster collec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7" draw:layer="layout" draw:type="line" svg:x1="17.426cm" svg:y1="40.247cm" svg:x2="17.415cm" svg:y2="42.676cm" draw:start-shape="id1" draw:start-glue-point="2" draw:end-shape="id7" draw:end-glue-point="0" svg:d="M17426 40247l-11 2429" svg:viewBox="0 0 12 2430">
          <text:p/>
        </draw:connector>
        <draw:custom-shape draw:style-name="gr12" draw:text-style-name="P19" draw:layer="layout" svg:width="5.397cm" svg:height="0.953cm" svg:x="17.933cm" svg:y="40.977cm">
          <text:p text:style-name="P18"><text:span text:style-name="T18">Yes → do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1" draw:layer="layout" svg:width="3.81cm" svg:height="0.953cm" svg:x="23.043cm" svg:y="25.154cm">
          <text:p text:style-name="P20"><text:span text:style-name="T19">d</text:span><text:span text:style-name="T20">iB</text:span><text:span text:style-name="T21">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22" draw:layer="layout" svg:width="6.255cm" svg:height="0.953cm" svg:x="4.598cm" svg:y="25.155cm">
          <text:p text:style-name="P18"><text:span text:style-name="T19">d</text:span><text:span text:style-name="T20">ij</text:span><text:span text:style-name="T21"> </text:span><text:span text:style-name="T18"><text:s/>(vector pair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 style:font-pitch="variable"/>
    <style:font-face style:name="Roboto Medium1" svg:font-family="'Roboto Medium'"/>
    <style:font-face style:name="Roboto1" svg:font-family="Roboto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4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0:47:28.589431070</meta:creation-date>
    <dc:date>2026-06-12T10:52:11.511136676</dc:date>
    <meta:editing-duration>PT4M43S</meta:editing-duration>
    <meta:editing-cycles>1</meta:editing-cycles>
    <meta:document-statistic meta:object-count="25"/>
    <meta:generator>LibreOffice/26.2.2.2$Linux_X86_64 LibreOffice_project/620$Build-2</meta:generator>
  </office:meta>
</office:document-meta>
</file>