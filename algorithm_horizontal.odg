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30000000FE64215FD.png" manifest:media-type="image/png"/>
  <manifest:file-entry manifest:full-path="Pictures/10006D7C00000F3D00000189864A531B.svg" manifest:media-type="image/svg+xml"/>
  <manifest:file-entry manifest:full-path="Pictures/100000010000005A0000001C0B366A5F.png" manifest:media-type="image/png"/>
  <manifest:file-entry manifest:full-path="Pictures/1000370400000951000002DFD7410CDB.svg" manifest:media-type="image/svg+xml"/>
  <manifest:file-entry manifest:full-path="Pictures/100000010000009C0000001E21ECC889.png" manifest:media-type="image/png"/>
  <manifest:file-entry manifest:full-path="Pictures/10005E1C0000101800000324671E4CA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/>
    <style:font-face style:name="Roboto Medium1" svg:font-family="'Roboto Medium'" style:font-pitch="variable"/>
    <style:font-face style:name="Roboto1" svg:font-family="Roboto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212cm" svg:stroke-color="#333333" draw:marker-start-width="0.518cm" draw:marker-end-width="0.518cm" draw:fill="none" draw:fill-color="#333333" loext:fill-use-slide-background="false" draw:textarea-horizontal-align="justify" draw:textarea-vertical-align="middle" draw:auto-grow-height="false" fo:min-height="1.21cm" fo:min-width="8.315cm" fo:padding-top="0.231cm" fo:padding-bottom="0.231cm" fo:padding-left="0.356cm" fo:padding-right="0.356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.212cm" svg:stroke-color="#00274e" draw:marker-start-width="0.518cm" draw:marker-end-width="0.518cm" draw:fill="none" draw:fill-color="#10263b" loext:fill-use-slide-background="false" draw:textarea-horizontal-align="justify" draw:textarea-vertical-align="top" draw:auto-grow-height="false" fo:min-height="3.549cm" fo:min-width="12.507cm" fo:padding-top="0.231cm" fo:padding-bottom="0.231cm" fo:padding-left="0.356cm" fo:padding-right="0.356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1">
      <style:graphic-properties draw:stroke="solid" svg:stroke-width="0.212cm" svg:stroke-color="#005d5d" draw:marker-start-width="0.518cm" draw:marker-end-width="0.518cm" draw:fill="none" draw:fill-color="#10263b" loext:fill-use-slide-background="false" draw:textarea-horizontal-align="justify" draw:textarea-vertical-align="top" draw:auto-grow-height="false" fo:min-height="3.345cm" fo:min-width="12.53cm" fo:padding-top="0.231cm" fo:padding-bottom="0.231cm" fo:padding-left="0.356cm" fo:padding-right="0.35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4c4c4c" draw:marker-start-width="0.518cm" draw:marker-end-width="0.518cm" draw:fill="none" loext:fill-use-slide-background="false" draw:textarea-horizontal-align="justify" draw:textarea-vertical-align="middle" draw:auto-grow-height="false" fo:min-height="3.19cm" fo:min-width="5.004cm" fo:padding-top="0.231cm" fo:padding-bottom="0.231cm" fo:padding-left="0.356cm" fo:padding-right="0.35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212cm" svg:stroke-color="#005d5d" draw:marker-start-width="0.518cm" draw:marker-end-width="0.518cm" draw:fill="none" draw:fill-color="#10263b" loext:fill-use-slide-background="false" draw:textarea-horizontal-align="justify" draw:textarea-vertical-align="top" draw:auto-grow-height="false" fo:min-height="4.983cm" fo:min-width="12.035cm" fo:padding-top="0.231cm" fo:padding-bottom="0.231cm" fo:padding-left="0.356cm" fo:padding-right="0.35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212cm" svg:stroke-color="#00274e" draw:marker-start-width="0.518cm" draw:marker-end-width="0.518cm" draw:fill="none" draw:fill-color="#10263b" loext:fill-use-slide-background="false" draw:textarea-horizontal-align="justify" draw:textarea-vertical-align="top" draw:auto-grow-height="false" fo:min-height="4.695cm" fo:min-width="12.383cm" fo:padding-top="0.231cm" fo:padding-bottom="0.231cm" fo:padding-left="0.356cm" fo:padding-right="0.35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59cm" svg:stroke-color="#4c4c4c" draw:marker-start-width="0.438cm" draw:marker-end="Arrowheads_20_22" draw:marker-end-width="0.538cm" draw:fill="none" draw:textarea-vertical-align="middle" fo:padding-top="0.204cm" fo:padding-bottom="0.204cm" fo:padding-left="0.329cm" fo:padding-right="0.329cm" loext:decorative="false"/>
    </style:style>
    <style:style style:name="gr10" style:family="graphic" style:parent-style-name="standard" style:list-style-name="L1">
      <style:graphic-properties draw:stroke="solid" svg:stroke-width="0.212cm" svg:stroke-color="#9e4f00" draw:marker-start-width="0.518cm" draw:marker-end-width="0.518cm" draw:fill="none" draw:fill-color="#10263b" loext:fill-use-slide-background="false" draw:textarea-horizontal-align="justify" draw:textarea-vertical-align="top" draw:auto-grow-height="false" fo:min-height="2.951cm" fo:min-width="13.207cm" fo:padding-top="0.231cm" fo:padding-bottom="0.231cm" fo:padding-left="0.356cm" fo:padding-right="0.35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11cm" fo:min-width="4.80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59cm" svg:stroke-color="#4c4c4c" draw:marker-start-width="0.439cm" draw:marker-end="Arrowheads_20_25" draw:marker-end-width="0.539cm" draw:fill="none" draw:textarea-vertical-align="middle" fo:padding-top="0.205cm" fo:padding-bottom="0.205cm" fo:padding-left="0.33cm" fo:padding-right="0.33cm" loext:decorative="false"/>
    </style:style>
    <style:style style:name="gr13" style:family="graphic" style:parent-style-name="objectwithoutfill">
      <style:graphic-properties svg:stroke-width="0.159cm" svg:stroke-color="#4c4c4c" draw:marker-start-width="0.439cm" draw:marker-end="Arrowheads_20_26" draw:marker-end-width="0.539cm" draw:fill="none" draw:textarea-vertical-align="middle" fo:padding-top="0.205cm" fo:padding-bottom="0.205cm" fo:padding-left="0.33cm" fo:padding-right="0.33cm" loext:decorative="false"/>
    </style:style>
    <style:style style:name="gr14" style:family="graphic" style:parent-style-name="objectwithoutfill">
      <style:graphic-properties svg:stroke-width="0.159cm" svg:stroke-color="#4c4c4c" draw:marker-start-width="0.439cm" draw:marker-end="Arrowheads_20_28" draw:marker-end-width="0.539cm" draw:fill="none" draw:textarea-vertical-align="middle" fo:padding-top="0.205cm" fo:padding-bottom="0.205cm" fo:padding-left="0.33cm" fo:padding-right="0.33cm" loext:decorative="false"/>
    </style:style>
    <style:style style:name="gr15" style:family="graphic" style:parent-style-name="objectwithoutfill">
      <style:graphic-properties svg:stroke-width="0.159cm" svg:stroke-color="#4c4c4c" draw:marker-start-width="0.439cm" draw:marker-end="Arrowheads_20_29" draw:marker-end-width="0.539cm" draw:fill="none" draw:textarea-vertical-align="middle" fo:padding-top="0.205cm" fo:padding-bottom="0.205cm" fo:padding-left="0.33cm" fo:padding-right="0.33cm" loext:decorative="false"/>
    </style:style>
    <style:style style:name="gr16" style:family="graphic" style:parent-style-name="objectwithoutfill">
      <style:graphic-properties svg:stroke-width="0.159cm" svg:stroke-color="#4c4c4c" draw:marker-start-width="0.439cm" draw:marker-end="Arrowheads_20_30" draw:marker-end-width="0.539cm" draw:fill="none" draw:textarea-vertical-align="middle" fo:padding-top="0.205cm" fo:padding-bottom="0.205cm" fo:padding-left="0.33cm" fo:padding-right="0.33cm" loext:decorative="false"/>
    </style:style>
    <style:style style:name="gr17" style:family="graphic" style:parent-style-name="standard" style:list-style-name="L1">
      <style:graphic-properties draw:stroke="solid" svg:stroke-width="0.212cm" svg:stroke-color="#023f62" draw:marker-start-width="0.518cm" draw:marker-end-width="0.518cm" draw:fill="none" draw:fill-color="#10263b" loext:fill-use-slide-background="false" draw:textarea-horizontal-align="justify" draw:textarea-vertical-align="middle" draw:auto-grow-height="false" fo:min-height="2.378cm" fo:min-width="7.237cm" fo:padding-top="0.231cm" fo:padding-bottom="0.231cm" fo:padding-left="0.356cm" fo:padding-right="0.35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59cm" svg:stroke-color="#4c4c4c" draw:marker-start-width="0.438cm" draw:marker-end="Arrowheads_20_31" draw:marker-end-width="0.538cm" draw:fill="none" draw:textarea-vertical-align="middle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611cm" fo:min-width="3.21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1.47cm" fo:min-width="6.617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159cm" svg:stroke-color="#4c4c4c" draw:marker-start-width="0.438cm" draw:marker-end="Arrowheads_20_35" draw:marker-end-width="0.538cm" draw:fill="none" draw:textarea-vertical-align="middle" fo:padding-top="0.204cm" fo:padding-bottom="0.204cm" fo:padding-left="0.329cm" fo:padding-right="0.329cm" loext:decorative="false"/>
    </style:style>
    <style:style style:name="gr22" style:family="graphic" style:parent-style-name="objectwithoutfill">
      <style:graphic-properties svg:stroke-width="0.159cm" svg:stroke-color="#4c4c4c" draw:marker-start-width="0.438cm" draw:marker-end="Arrowheads_20_36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margin-left="0cm" fo:margin-right="0cm" fo:margin-top="0.42cm" fo:margin-bottom="0.35cm" fo:line-height="100%" fo:text-align="center" fo:text-indent="0cm"/>
      <style:text-properties fo:color="#333333" loext:opacity="100%" fo:font-size="14pt" fo:font-weight="bold" style:font-size-asian="14pt" style:font-size-complex="14pt"/>
    </style:style>
    <style:style style:name="P2" style:family="paragraph">
      <loext:graphic-properties draw:fill="none" draw:fill-color="#333333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fo:font-size="14pt" fo:font-weight="bold" style:font-size-asian="14pt" style:font-size-complex="14pt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color="#10263b" loext:opacity="100%" fo:font-size="14pt" fo:font-weight="normal" style:font-size-asian="14pt" style:font-size-complex="14pt"/>
    </style:style>
    <style:style style:name="P4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10263b" loext:opacity="100%" fo:font-size="14pt" fo:font-weight="normal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color="#005d5d" loext:opacity="100%" fo:font-size="14pt" fo:font-weight="normal" style:font-size-asian="14pt" style:font-size-complex="14pt"/>
    </style:style>
    <style:style style:name="P7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005d5d" loext:opacity="100%" fo:font-size="14pt" fo:font-weight="normal" style:font-size-asian="14pt" style:font-size-complex="14pt"/>
    </style:style>
    <style:style style:name="P8" style:family="paragraph">
      <style:paragraph-properties fo:text-align="center"/>
      <style:text-properties fo:color="#4c4c4c" loext:opacity="100%" style:font-name="Roboto1"/>
    </style:style>
    <style:style style:name="P9" style:family="paragraph">
      <loext:graphic-properties draw:fill="none"/>
      <style:paragraph-properties fo:text-align="center" style:writing-mode="lr-tb"/>
      <style:text-properties fo:color="#4c4c4c" loext:opacity="100%" style:font-name="Roboto1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color="#9e4f00" loext:opacity="100%" fo:font-size="14pt" fo:font-weight="normal" style:font-size-asian="14pt" style:font-size-complex="14pt"/>
    </style:style>
    <style:style style:name="P11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9e4f00" loext:opacity="100%" fo:font-size="14pt" fo:font-weight="normal" style:font-size-asian="14pt" style:font-size-complex="14pt"/>
    </style:style>
    <style:style style:name="P12" style:family="paragraph">
      <style:paragraph-properties fo:text-align="center"/>
      <style:text-properties fo:color="#4c4c4c" loext:opacity="100%"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4c4c4c" loext:opacity="100%" fo:font-weight="bold" style:font-weight-asian="bold" style:font-weight-complex="bold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color="#023f62" loext:opacity="100%" fo:font-size="14pt" fo:font-weight="bold" style:font-size-asian="14pt" style:font-size-complex="14pt"/>
    </style:style>
    <style:style style:name="P15" style:family="paragraph">
      <loext:graphic-properties draw:fill="none" draw:fill-color="#10263b"/>
      <style:paragraph-properties fo:margin-left="0cm" fo:margin-right="0cm" fo:margin-top="0.42cm" fo:margin-bottom="0.35cm" fo:line-height="100%" fo:text-align="center" fo:text-indent="0cm" style:writing-mode="lr-tb"/>
      <style:text-properties fo:color="#023f62" loext:opacity="100%" fo:font-size="14pt" fo:font-weight="bold" style:font-size-asian="14pt" style:font-size-complex="14pt"/>
    </style:style>
    <style:style style:name="P16" style:family="paragraph">
      <style:paragraph-properties fo:text-align="center"/>
      <style:text-properties fo:color="#4c4c4c" loext:opacity="100%" style:font-name="Roboto1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4c4c4c" loext:opacity="100%" style:font-name="Roboto1" fo:font-weight="bold" style:font-weight-asian="bold" style:font-weight-complex="bold"/>
    </style:style>
    <style:style style:name="P18" style:family="paragraph">
      <style:paragraph-properties fo:text-align="center"/>
      <style:text-properties fo:color="#4c4c4c" loext:opacity="100%" style:font-name="TexMaths Symbols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4c4c4c" loext:opacity="100%" style:font-name="TexMaths Symbols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4c4c4c" loext:opacity="100%" style:font-name="Roboto1" fo:font-weight="bold" style:font-weight-asian="bold" style:font-weight-complex="bold"/>
    </style:style>
    <style:style style:name="T1" style:family="text">
      <style:text-properties fo:color="#333333" loext:opacity="100%" style:font-name="Roboto Medium1" fo:font-size="28pt" fo:font-weight="bold" style:font-size-asian="28pt" style:font-size-complex="28pt"/>
    </style:style>
    <style:style style:name="T2" style:family="text">
      <style:text-properties fo:color="#10263b" loext:opacity="100%" style:font-name="Roboto Medium1" fo:font-size="28pt" fo:font-weight="normal" style:font-size-asian="28pt" style:font-size-complex="28pt"/>
    </style:style>
    <style:style style:name="T3" style:family="text">
      <style:text-properties fo:color="#10263b" loext:opacity="100%" style:text-position="0% 100%" style:font-name="Roboto Medium" fo:font-size="32pt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4" style:family="text">
      <style:text-properties fo:color="#005d5d" loext:opacity="100%" style:font-name="Roboto Medium1" fo:font-size="28pt" fo:font-weight="normal" style:font-size-asian="28pt" style:font-size-complex="28pt"/>
    </style:style>
    <style:style style:name="T5" style:family="text">
      <style:text-properties fo:color="#4c4c4c" loext:opacity="100%" style:font-name="TexMaths Symbols1" fo:font-size="26pt" fo:font-style="normal" style:text-underline-style="none" fo:font-weight="normal" style:font-name-asian="TexMaths Symbols1" style:font-size-asian="26pt" style:font-style-asian="normal" style:font-weight-asian="normal" style:font-name-complex="TexMaths Symbols1" style:font-size-complex="26pt" style:font-style-complex="normal" style:font-weight-complex="normal"/>
    </style:style>
    <style:style style:name="T6" style:family="text">
      <style:text-properties fo:color="#4c4c4c" loext:opacity="100%" style:text-position="sub 58%" style:font-name="TexMaths Symbols1" fo:font-size="26pt" fo:font-style="normal" style:text-underline-style="none" fo:font-weight="normal" style:font-name-asian="TexMaths Symbols1" style:font-size-asian="26pt" style:font-style-asian="normal" style:font-weight-asian="normal" style:font-name-complex="TexMaths Symbols1" style:font-size-complex="26pt" style:font-style-complex="normal" style:font-weight-complex="normal"/>
    </style:style>
    <style:style style:name="T7" style:family="text">
      <style:text-properties fo:color="#4c4c4c" loext:opacity="100%" style:text-position="0% 100%" style:font-name="Roboto" fo:font-size="26pt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8" style:family="text">
      <style:text-properties fo:color="#4c4c4c" loext:opacity="100%" style:font-name="Roboto1" fo:font-size="26pt" style:font-size-asian="26pt" style:font-size-complex="26pt"/>
    </style:style>
    <style:style style:name="T9" style:family="text">
      <style:text-properties fo:color="#005d5d" loext:opacity="100%" style:font-name="Roboto Medium1" fo:font-size="21pt" fo:font-weight="normal" style:font-size-asian="21pt" style:font-size-complex="21pt"/>
    </style:style>
    <style:style style:name="T10" style:family="text">
      <style:text-properties fo:color="#10263b" loext:opacity="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" style:family="text">
      <style:text-properties fo:color="#10263b" loext:opacity="100%" style:text-position="sub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2" style:family="text">
      <style:text-properties fo:color="#10263b" loext:opacity="100%" style:font-name="Roboto Medium1" fo:font-size="21pt" fo:font-weight="normal" style:font-size-asian="21pt" style:font-size-complex="21pt"/>
    </style:style>
    <style:style style:name="T13" style:family="text">
      <style:text-properties fo:color="#9e4f00" loext:opacity="100%" style:font-name="Roboto Medium1" fo:font-size="28pt" fo:font-weight="normal" style:font-size-asian="28pt" style:font-size-complex="28pt"/>
    </style:style>
    <style:style style:name="T14" style:family="text">
      <style:text-properties fo:color="#9e4f00" loext:opacity="100%" style:font-name="Roboto Medium1" fo:font-size="21pt" fo:font-weight="normal" style:font-size-asian="21pt" style:font-size-complex="21pt"/>
    </style:style>
    <style:style style:name="T15" style:family="text">
      <style:text-properties fo:color="#4c4c4c" loext:opacity="100%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23f62" loext:opacity="100%" style:font-name="Roboto Medium1" fo:font-size="28pt" fo:font-weight="bold" style:font-size-asian="28pt" style:font-size-complex="28pt"/>
    </style:style>
    <style:style style:name="T17" style:family="text">
      <style:text-properties fo:color="#4c4c4c" loext:opacity="100%" style:font-name="Robot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4c4c4c" loext:opacity="100%" style:font-name="TexMaths Symbols1" fo:font-size="36pt" fo:font-style="normal" style:text-underline-style="none" fo:font-weight="bold" style:font-name-asian="TexMaths Symbols1" style:font-size-asian="36pt" style:font-style-asian="normal" style:font-weight-asian="bold" style:font-name-complex="TexMaths Symbols1" style:font-size-complex="36pt" style:font-style-complex="normal" style:font-weight-complex="bold"/>
    </style:style>
    <style:style style:name="T19" style:family="text">
      <style:text-properties fo:color="#4c4c4c" loext:opacity="100%" style:text-position="sub 58%" style:font-name="TexMaths Symbols1" fo:font-size="36pt" fo:font-style="normal" style:text-underline-style="none" fo:font-weight="bold" style:font-name-asian="TexMaths Symbols1" style:font-size-asian="36pt" style:font-style-asian="normal" style:font-weight-asian="bold" style:font-name-complex="TexMaths Symbols1" style:font-size-complex="36pt" style:font-style-complex="normal" style:font-weight-complex="bold"/>
    </style:style>
    <style:style style:name="T20" style:family="text">
      <style:text-properties fo:color="#4c4c4c" loext:opacity="100%" style:text-position="0% 100%" style:font-name="Roboto" fo:font-size="36pt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21" style:family="text">
      <style:text-properties fo:color="#4c4c4c" loext:opacity="100%" style:font-name="Roboto1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4c4c4c" loext:opacity="100%" style:font-name="Roboto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07cm" svg:height="1.852cm" svg:x="22.198cm" svg:y="1.445cm">
          <text:p text:style-name="P1"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4" xml:id="id2" draw:id="id2" draw:layer="layout" svg:width="13.653cm" svg:height="4.445cm" svg:x="19.963cm" svg:y="4.567cm">
          <text:p text:style-name="P3"><text:span text:style-name="T2">Compute pairwise distance</text:span></text:p>
          <text:p text:style-name="P3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" draw:layer="layout" svg:width="10.709cm" svg:height="2.088cm" svg:x="21.502cm" svg:y="6.572cm">
          <draw:image xlink:href="Pictures/10005E1C0000101800000324671E4CAF.svg" xlink:type="simple" xlink:show="embed" xlink:actuate="onLoad" draw:mime-type="image/svg+xml">
            <text:p/>
          </draw:image>
          <draw:image xlink:href="Pictures/100000010000009C0000001E21ECC889.png" xlink:type="simple" xlink:show="embed" xlink:actuate="onLoad" draw:mime-type="image/png"/>
          <svg:title>TexMaths</svg:title>
          <svg:desc>26§display§d_{ij}=\dfrac{D(\va{v}_i, \va{v}_j)^2}{R^2}, ~~ d_{iB}=1§svg§600§TRUE§</svg:desc>
        </draw:frame>
        <draw:g draw:style-name="gr4">
          <draw:custom-shape draw:style-name="gr5" draw:text-style-name="P7" xml:id="id3" draw:id="id3" draw:layer="layout" svg:width="13.652cm" svg:height="4.217cm" svg:x="19.94cm" svg:y="10.105cm">
            <text:p text:style-name="P6"><text:span text:style-name="T4">Find the global minimu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" draw:text-style-name="P5" draw:layer="layout" svg:width="10.14cm" svg:height="1.019cm" svg:x="21.662cm" svg:y="12.743cm">
            <draw:image xlink:href="Pictures/10006D7C00000F3D00000189864A531B.svg" xlink:type="simple" xlink:show="embed" xlink:actuate="onLoad" draw:mime-type="image/svg+xml">
              <text:p/>
            </draw:image>
            <draw:image xlink:href="Pictures/10000001000000930000000FE64215FD.png" xlink:type="simple" xlink:show="embed" xlink:actuate="onLoad" draw:mime-type="image/png"/>
            <svg:title>TexMaths</svg:title>
            <svg:desc>26§display§d_{min}=min\{ \text{all } d_{ij}, ~d_{iB}  \}§svg§600§TRUE§</svg:desc>
          </draw:frame>
        </draw:g>
        <draw:custom-shape draw:style-name="gr6" draw:text-style-name="P9" xml:id="id4" draw:id="id4" draw:layer="layout" svg:width="11.43cm" svg:height="7.302cm" svg:x="21.02cm" svg:y="15.605cm">
          <text:p text:style-name="P8"><text:span text:style-name="T5">d</text:span><text:span text:style-name="T6">min</text:span><text:span text:style-name="T7"> </text:span><text:span text:style-name="T8"><text:s/>is?</text:span></text:p>
          <text:p text:style-name="P8"><text:span text:style-name="T8">which typ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draw:style-name="gr4" xml:id="id8" draw:id="id8">
          <draw:custom-shape draw:style-name="gr7" draw:text-style-name="P7" xml:id="id5" draw:id="id5" draw:layer="layout" svg:width="13.335cm" svg:height="6.033cm" svg:x="4.975cm" svg:y="16.24cm">
            <text:p text:style-name="P6"><text:span text:style-name="T4">Merge vectors</text:span></text:p>
            <text:p text:style-name="P6"><text:span text:style-name="T9"/></text:p>
            <text:p text:style-name="P6"><text:span text:style-name="T9"/></text:p>
            <text:p text:style-name="P6"><text:span text:style-name="T9">New proto-vector replaces pai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" draw:text-style-name="P5" draw:layer="layout" svg:width="6.198cm" svg:height="1.908cm" svg:x="8.537cm" svg:y="18.462cm">
            <draw:image xlink:href="Pictures/1000370400000951000002DFD7410CDB.svg" xlink:type="simple" xlink:show="embed" xlink:actuate="onLoad" draw:mime-type="image/svg+xml">
              <text:p/>
            </draw:image>
            <draw:image xlink:href="Pictures/100000010000005A0000001C0B366A5F.png" xlink:type="simple" xlink:show="embed" xlink:actuate="onLoad" draw:mime-type="image/png"/>
            <svg:title>TexMaths</svg:title>
            <svg:desc>26§display§    \va{v}_{new}=\dfrac{ \va{v}_i+ \va{v}_j }{2}§svg§600§TRUE§</svg:desc>
          </draw:frame>
        </draw:g>
        <draw:custom-shape draw:style-name="gr8" draw:text-style-name="P4" xml:id="id6" draw:id="id6" draw:layer="layout" svg:width="13.653cm" svg:height="5.715cm" svg:x="35.644cm" svg:y="16.375cm">
          <text:p text:style-name="P3"><text:span text:style-name="T2">Promote </text:span><text:span text:style-name="T10">v</text:span><text:span text:style-name="T11">i</text:span><text:span text:style-name="T3"> </text:span><text:span text:style-name="T2">→ cluster</text:span></text:p>
          <text:p text:style-name="P3"><text:span text:style-name="T12">Remove </text:span><text:span text:style-name="T10">v</text:span><text:span text:style-name="T11">i</text:span><text:span text:style-name="T3"> </text:span><text:span text:style-name="T12"><text:s/>from the list and add to final cluster collection</text:span></text:p>
          <text:p text:style-name="P3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5" draw:layer="layout" draw:line-skew="-14.768cm" svg:x1="19.575cm" svg:y1="29.07cm" svg:x2="19.963cm" svg:y2="6.789cm" draw:start-shape="id1" draw:start-glue-point="3" draw:end-shape="id2" draw:end-glue-point="3" svg:d="M19575 29070h-15375v-22281h15763" svg:viewBox="0 0 15764 22282">
          <text:p/>
        </draw:connector>
        <draw:custom-shape draw:style-name="gr10" draw:text-style-name="P11" xml:id="id1" draw:id="id1" draw:layer="layout" svg:width="14.287cm" svg:height="3.781cm" svg:x="19.575cm" svg:y="27.18cm">
          <text:p text:style-name="P10"><text:span text:style-name="T13">Vectors remaining?</text:span></text:p>
          <text:p text:style-name="P10"><text:span text:style-name="T14">Is the proto-vector list empty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5.397cm" svg:height="0.953cm" svg:x="12.455cm" svg:y="26.635cm">
          <text:p text:style-name="P12"><text:span text:style-name="T15"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5" draw:layer="layout" draw:type="line" svg:x1="26.801cm" svg:y1="3.197cm" svg:x2="26.789cm" svg:y2="4.567cm" draw:end-shape="id2" draw:end-glue-point="0" svg:d="M26801 3197l-12 1370" svg:viewBox="0 0 13 1371">
          <text:p/>
        </draw:connector>
        <draw:connector draw:style-name="gr13" draw:text-style-name="P5" draw:layer="layout" draw:type="line" svg:x1="26.789cm" svg:y1="9.012cm" svg:x2="26.766cm" svg:y2="10.105cm" draw:start-shape="id2" draw:start-glue-point="2" draw:end-shape="id3" draw:end-glue-point="0" svg:d="M26789 9012l-23 1093" svg:viewBox="0 0 24 1094">
          <text:p/>
        </draw:connector>
        <draw:connector draw:style-name="gr14" draw:text-style-name="P5" draw:layer="layout" draw:type="line" svg:x1="26.766cm" svg:y1="14.322cm" svg:x2="26.735cm" svg:y2="15.605cm" draw:start-shape="id3" draw:start-glue-point="2" draw:end-shape="id4" draw:end-glue-point="4" svg:d="M26766 14322l-31 1283" svg:viewBox="0 0 32 1284">
          <text:p/>
        </draw:connector>
        <draw:connector draw:style-name="gr15" draw:text-style-name="P5" draw:layer="layout" svg:x1="11.642cm" svg:y1="22.273cm" svg:x2="26.718cm" svg:y2="27.18cm" draw:start-shape="id5" draw:start-glue-point="2" draw:end-shape="id1" draw:end-glue-point="0" svg:d="M11642 22273v2453h15076v2454" svg:viewBox="0 0 15077 4908">
          <text:p/>
        </draw:connector>
        <draw:connector draw:style-name="gr16" draw:text-style-name="P5" draw:layer="layout" svg:x1="42.47cm" svg:y1="22.09cm" svg:x2="26.718cm" svg:y2="27.18cm" draw:start-shape="id6" draw:start-glue-point="2" draw:end-shape="id1" draw:end-glue-point="0" svg:d="M42470 22090v2601h-15752v2489" svg:viewBox="0 0 15753 5091">
          <text:p/>
        </draw:connector>
        <draw:custom-shape draw:style-name="gr17" draw:text-style-name="P15" xml:id="id7" draw:id="id7" draw:layer="layout" svg:width="8.255cm" svg:height="3.146cm" svg:x="22.615cm" svg:y="33.649cm">
          <text:p text:style-name="P14"><text:span text:style-name="T16">Final cluster </text:span><text:span text:style-name="T16">col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" draw:text-style-name="P5" draw:layer="layout" draw:type="line" svg:x1="26.718cm" svg:y1="30.961cm" svg:x2="26.742cm" svg:y2="33.649cm" draw:start-shape="id1" draw:start-glue-point="2" draw:end-shape="id7" draw:end-glue-point="0" svg:d="M26718 30961l24 2688" svg:viewBox="0 0 25 2689">
          <text:p/>
        </draw:connector>
        <draw:custom-shape draw:style-name="gr11" draw:text-style-name="P17" draw:layer="layout" svg:width="5.397cm" svg:height="0.953cm" svg:x="24.52cm" svg:y="31.715cm">
          <text:p text:style-name="P16"><text:span text:style-name="T17">Yes →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9" draw:layer="layout" svg:width="3.81cm" svg:height="0.953cm" svg:x="31.505cm" svg:y="17.11cm">
          <text:p text:style-name="P18"><text:span text:style-name="T18">d</text:span><text:span text:style-name="T19">iB</text:span><text:span text:style-name="T20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0" draw:layer="layout" svg:width="7.303cm" svg:height="1.906cm" svg:x="17.605cm" svg:y="15.574cm">
          <text:p text:style-name="P16"><text:span text:style-name="T18">d</text:span><text:span text:style-name="T19">ij</text:span><text:span text:style-name="T20"> </text:span><text:span text:style-name="T21"><text:s/></text:span></text:p>
          <text:p text:style-name="P16"><text:span text:style-name="T22">(vector pai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5" draw:layer="layout" svg:x1="21.02cm" svg:y1="19.256cm" svg:x2="18.31cm" svg:y2="19.256cm" draw:start-shape="id4" draw:start-glue-point="5" draw:end-shape="id8" draw:end-glue-point="1" svg:d="M21020 19256h-2710" svg:viewBox="0 0 2711 1">
          <text:p/>
        </draw:connector>
        <draw:connector draw:style-name="gr22" draw:text-style-name="P5" draw:layer="layout" svg:x1="32.45cm" svg:y1="19.256cm" svg:x2="35.644cm" svg:y2="19.232cm" draw:start-shape="id4" draw:start-glue-point="7" draw:end-shape="id6" draw:end-glue-point="3" svg:d="M32450 19256h1597v-24h1597" svg:viewBox="0 0 3195 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/>
    <style:font-face style:name="Roboto Medium1" svg:font-family="'Roboto Medium'" style:font-pitch="variable"/>
    <style:font-face style:name="Roboto1" svg:font-family="Roboto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07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0:47:28.589431070</meta:creation-date>
    <dc:date>2026-06-26T08:02:42.857999311</dc:date>
    <meta:editing-duration>PT8M1S</meta:editing-duration>
    <meta:editing-cycles>3</meta:editing-cycles>
    <meta:generator>LibreOffice/26.2.2.2$Linux_X86_64 LibreOffice_project/620$Build-2</meta:generator>
    <meta:print-date>2026-06-26T07:58:38.929227972</meta:print-date>
    <meta:printed-by>PDF files</meta:printed-by>
    <meta:document-statistic meta:object-count="26"/>
  </office:meta>
</office:document-meta>
</file>